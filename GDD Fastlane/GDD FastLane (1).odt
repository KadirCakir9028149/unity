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text:start-value="2">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3"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0"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0"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0"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0"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2">
      <text:list-level-style-number text:level="1"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1"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1"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1"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1"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1"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1"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text:start-value="2">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3"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0"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0"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0"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0"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text:start-value="2">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3"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0"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0"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0"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0"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text:start-value="2">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3"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0"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0"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0"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0"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fo:text-align="center"/>
      <style:text-properties fo:font-size="24pt" style:font-size-asian="24pt" style:font-size-complex="24pt"/>
    </style:style>
    <style:style style:name="P2" style:parent-style-name="Standaard" style:family="paragraph">
      <style:paragraph-properties fo:text-align="center"/>
      <style:text-properties fo:font-size="20pt" style:font-size-asian="20pt" style:font-size-complex="20pt"/>
    </style:style>
    <style:style style:name="P3" style:parent-style-name="Kop2" style:master-page-name="MP1" style:family="paragraph">
      <style:paragraph-properties fo:break-before="page"/>
      <style:text-properties fo:font-weight="bold" style:font-weight-asian="bold" fo:font-size="16pt" style:font-size-asian="16pt" style:font-size-complex="16pt"/>
    </style:style>
    <style:style style:name="T10" style:parent-style-name="Standaardalinea-lettertype" style:family="text">
      <style:text-properties fo:font-size="14pt" style:font-size-asian="14pt" style:font-size-complex="13pt"/>
    </style:style>
    <style:style style:name="T11" style:parent-style-name="Standaardalinea-lettertype" style:family="text">
      <style:text-properties fo:font-size="14pt" style:font-size-asian="14pt" style:font-size-complex="13pt"/>
    </style:style>
    <style:style style:name="T12" style:parent-style-name="Standaardalinea-lettertype" style:family="text">
      <style:text-properties fo:font-size="14pt" style:font-size-asian="14pt" style:font-size-complex="13pt"/>
    </style:style>
    <style:style style:name="T13" style:parent-style-name="Standaardalinea-lettertype" style:family="text">
      <style:text-properties fo:font-size="11pt" style:font-size-asian="11pt" style:font-size-complex="11pt"/>
    </style:style>
    <style:style style:name="P14" style:parent-style-name="Kop3" style:family="paragraph">
      <style:text-properties fo:font-size="14pt" style:font-size-asian="14pt" style:font-size-complex="13pt"/>
    </style:style>
    <style:style style:name="P15" style:parent-style-name="Kop3" style:family="paragraph">
      <style:text-properties fo:font-size="14pt" style:font-size-asian="14pt" style:font-size-complex="13pt"/>
    </style:style>
    <style:style style:name="P16" style:parent-style-name="Lijstalinea" style:family="paragraph"/>
    <style:style style:name="P17" style:parent-style-name="Lijstalinea" style:family="paragraph"/>
    <style:style style:name="P18" style:parent-style-name="Kop2" style:family="paragraph">
      <style:text-properties fo:font-weight="bold" style:font-weight-asian="bold" fo:font-size="16pt" style:font-size-asian="16pt" style:font-size-complex="16pt"/>
    </style:style>
    <style:style style:name="P19" style:parent-style-name="Kop3" style:family="paragraph">
      <style:text-properties fo:font-size="14pt" style:font-size-asian="14pt" style:font-size-complex="13pt"/>
    </style:style>
    <style:style style:name="P20" style:parent-style-name="Kop3" style:family="paragraph">
      <style:text-properties fo:font-size="14pt" style:font-size-asian="14pt" style:font-size-complex="13pt"/>
    </style:style>
    <style:style style:name="P21" style:parent-style-name="Kop3" style:family="paragraph">
      <style:text-properties fo:font-size="14pt" style:font-size-asian="14pt" style:font-size-complex="13pt"/>
    </style:style>
    <style:style style:name="P22" style:parent-style-name="Standaard" style:family="paragraph">
      <style:paragraph-properties fo:line-height="100%"/>
      <style:text-properties style:font-name-asian="Times New Roman" style:font-name-complex="Calibri" fo:font-size="12pt" style:font-size-asian="12pt" style:font-size-complex="12pt" style:language-asian="nl" style:country-asian="NL"/>
    </style:style>
    <style:style style:name="P23" style:parent-style-name="Standaard" style:family="paragraph">
      <style:paragraph-properties fo:line-height="100%"/>
      <style:text-properties style:font-name-asian="Times New Roman" style:font-name-complex="Calibri" fo:font-size="12pt" style:font-size-asian="12pt" style:font-size-complex="12pt" style:language-asian="nl" style:country-asian="NL"/>
    </style:style>
    <style:style style:name="P24" style:parent-style-name="Kop3" style:family="paragraph">
      <style:text-properties fo:font-size="14pt" style:font-size-asian="14pt" style:font-size-complex="13pt"/>
    </style:style>
    <style:style style:name="P25" style:parent-style-name="Kop3" style:family="paragraph">
      <style:text-properties fo:font-size="14pt" style:font-size-asian="14pt" style:font-size-complex="13pt"/>
    </style:style>
    <style:style style:name="P26" style:parent-style-name="Lijstalinea" style:family="paragraph"/>
    <style:style style:name="P27" style:parent-style-name="Lijstalinea" style:family="paragraph"/>
    <style:style style:name="P28" style:parent-style-name="Lijstalinea" style:family="paragraph"/>
    <style:style style:name="P29" style:parent-style-name="Lijstalinea" style:family="paragraph"/>
    <style:style style:name="P30" style:parent-style-name="Lijstalinea" style:family="paragraph"/>
    <style:style style:name="P31" style:parent-style-name="Lijstalinea" style:family="paragraph"/>
    <style:style style:name="P32" style:parent-style-name="Lijstalinea" style:family="paragraph"/>
    <style:style style:name="P33" style:parent-style-name="Lijstalinea" style:family="paragraph"/>
    <style:style style:name="P34" style:parent-style-name="Lijstalinea" style:family="paragraph"/>
    <style:style style:name="P35" style:parent-style-name="Lijstalinea" style:family="paragraph"/>
    <style:style style:name="P36" style:parent-style-name="Lijstalinea" style:family="paragraph"/>
    <style:style style:name="P37" style:parent-style-name="Kop2" style:family="paragraph"/>
    <style:style style:name="P38" style:parent-style-name="Kop2" style:family="paragraph"/>
    <style:style style:name="P39" style:parent-style-name="Kop2" style:family="paragraph"/>
    <style:style style:name="P40" style:parent-style-name="Kop2" style:family="paragraph"/>
    <style:style style:name="P41" style:parent-style-name="Lijstalinea" style:family="paragraph">
      <style:paragraph-properties fo:line-height="100%"/>
      <style:text-properties style:font-name-asian="Times New Roman" style:font-name-complex="Calibri" fo:font-size="12pt" style:font-size-asian="12pt" style:font-size-complex="12pt" style:language-asian="nl" style:country-asian="NL"/>
    </style:style>
    <style:style style:name="P42" style:parent-style-name="Lijstalinea" style:family="paragraph">
      <style:paragraph-properties fo:line-height="100%"/>
      <style:text-properties style:font-name-asian="Times New Roman" style:font-name-complex="Calibri" fo:font-size="12pt" style:font-size-asian="12pt" style:font-size-complex="12pt" style:language-asian="nl" style:country-asian="NL"/>
    </style:style>
    <style:style style:name="P43" style:parent-style-name="Lijstalinea" style:family="paragraph">
      <style:paragraph-properties fo:line-height="100%"/>
      <style:text-properties style:font-name-asian="Times New Roman" style:font-name-complex="Calibri" fo:font-size="12pt" style:font-size-asian="12pt" style:font-size-complex="12pt" style:language-asian="nl" style:country-asian="NL"/>
    </style:style>
    <style:style style:name="P44" style:parent-style-name="Lijstalinea" style:family="paragraph">
      <style:paragraph-properties fo:line-height="100%"/>
      <style:text-properties style:font-name-asian="Times New Roman" style:font-name-complex="Calibri" fo:font-size="12pt" style:font-size-asian="12pt" style:font-size-complex="12pt" style:language-asian="nl" style:country-asian="NL"/>
    </style:style>
    <style:style style:name="P45" style:parent-style-name="Lijstalinea" style:family="paragraph">
      <style:paragraph-properties fo:line-height="100%"/>
      <style:text-properties style:font-name-asian="Times New Roman" style:font-name-complex="Calibri" fo:font-size="12pt" style:font-size-asian="12pt" style:font-size-complex="12pt" style:language-asian="nl" style:country-asian="NL"/>
    </style:style>
    <style:style style:name="P46" style:parent-style-name="Lijstalinea" style:family="paragraph"/>
    <style:style style:name="T47" style:parent-style-name="Standaardalinea-lettertype" style:family="text">
      <style:text-properties style:font-name-asian="Times New Roman" style:font-name-complex="Calibri" fo:font-size="12pt" style:font-size-asian="12pt" style:font-size-complex="12pt" style:language-asian="nl" style:country-asian="NL"/>
    </style:style>
    <style:style style:name="P48" style:parent-style-name="Kop2" style:family="paragraph"/>
    <style:style style:name="P49" style:parent-style-name="Lijstalinea" style:family="paragraph">
      <style:paragraph-properties fo:line-height="100%"/>
      <style:text-properties style:font-name-asian="Times New Roman" style:font-name-complex="Calibri" fo:font-size="12pt" style:font-size-asian="12pt" style:font-size-complex="12pt" style:language-asian="nl" style:country-asian="NL"/>
    </style:style>
    <style:style style:name="P50" style:parent-style-name="Lijstalinea" style:family="paragraph">
      <style:paragraph-properties fo:line-height="100%"/>
      <style:text-properties style:font-name-asian="Times New Roman" style:font-name-complex="Calibri" fo:font-size="12pt" style:font-size-asian="12pt" style:font-size-complex="12pt" style:language-asian="nl" style:country-asian="NL"/>
    </style:style>
    <style:style style:name="P51" style:parent-style-name="Lijstalinea" style:family="paragraph">
      <style:paragraph-properties fo:line-height="100%"/>
      <style:text-properties style:font-name-asian="Times New Roman" style:font-name-complex="Calibri" fo:font-size="12pt" style:font-size-asian="12pt" style:font-size-complex="12pt" style:language-asian="nl" style:country-asian="NL"/>
    </style:style>
    <style:style style:name="P52" style:parent-style-name="Lijstalinea" style:family="paragraph">
      <style:paragraph-properties fo:line-height="100%"/>
      <style:text-properties style:font-name-asian="Times New Roman" style:font-name-complex="Calibri" fo:font-size="12pt" style:font-size-asian="12pt" style:font-size-complex="12pt" style:language-asian="nl" style:country-asian="NL"/>
    </style:style>
    <style:style style:name="P53" style:parent-style-name="Lijstalinea" style:family="paragraph">
      <style:paragraph-properties fo:line-height="100%"/>
      <style:text-properties style:font-name-asian="Times New Roman" style:font-name-complex="Calibri" fo:font-size="12pt" style:font-size-asian="12pt" style:font-size-complex="12pt" style:language-asian="nl" style:country-asian="NL"/>
    </style:style>
    <style:style style:name="P54" style:parent-style-name="Lijstalinea" style:family="paragraph"/>
    <style:style style:name="T55" style:parent-style-name="Standaardalinea-lettertype" style:family="text">
      <style:text-properties style:font-name-asian="Times New Roman" style:font-name-complex="Calibri" fo:font-size="12pt" style:font-size-asian="12pt" style:font-size-complex="12pt" style:language-asian="nl" style:country-asian="NL"/>
    </style:style>
    <style:style style:name="P56" style:parent-style-name="Standaard" style:family="paragraph"/>
    <style:style style:name="P57" style:parent-style-name="Standaard" style:family="paragraph"/>
    <style:style style:name="P58" style:parent-style-name="Standaard" style:family="paragraph"/>
    <style:style style:name="P59" style:parent-style-name="Standaard" style:family="paragraph"/>
    <style:style style:name="P60" style:parent-style-name="Standaard" style:family="paragraph"/>
    <style:style style:name="P61" style:parent-style-name="Standaard" style:family="paragraph"/>
    <style:style style:name="P62" style:parent-style-name="Kop2" style:family="paragraph"/>
    <style:style style:name="P63" style:parent-style-name="Kop2" style:family="paragraph"/>
    <style:style style:name="P64" style:parent-style-name="Kop2" style:family="paragraph"/>
    <style:style style:name="P65" style:parent-style-name="Lijstalinea" style:family="paragraph">
      <style:paragraph-properties fo:line-height="100%"/>
      <style:text-properties style:font-name-asian="Times New Roman" style:font-name-complex="Calibri" fo:font-size="12pt" style:font-size-asian="12pt" style:font-size-complex="12pt" style:language-asian="nl" style:country-asian="NL"/>
    </style:style>
    <style:style style:name="P66" style:parent-style-name="Lijstalinea" style:family="paragraph"/>
    <style:style style:name="T67" style:parent-style-name="Standaardalinea-lettertype" style:family="text">
      <style:text-properties style:font-name-asian="Times New Roman" style:font-name-complex="Calibri" fo:font-size="12pt" style:font-size-asian="12pt" style:font-size-complex="12pt" style:language-asian="nl" style:country-asian="NL"/>
    </style:style>
    <style:style style:name="P68" style:parent-style-name="Kop2" style:family="paragraph"/>
    <style:style style:name="P69" style:parent-style-name="Kop2" style:family="paragraph"/>
    <style:style style:name="P70" style:parent-style-name="Standaard" style:family="paragraph">
      <style:paragraph-properties fo:break-before="page" fo:margin-bottom="0.1111in" fo:line-height="106%"/>
    </style:style>
    <style:style style:name="P71" style:parent-style-name="Kop2" style:family="paragraph"/>
    <style:style style:name="P72" style:parent-style-name="Kop2" style:family="paragraph"/>
    <style:style style:name="P73" style:parent-style-name="Kop2" style:family="paragraph"/>
    <style:style style:name="P74" style:parent-style-name="Kop2" style:family="paragraph"/>
    <style:style style:name="P75" style:parent-style-name="Kop3" style:family="paragraph"/>
    <style:style style:name="P76" style:parent-style-name="Lijstalinea" style:family="paragraph"/>
    <style:style style:name="P77" style:parent-style-name="Lijstalinea" style:family="paragraph"/>
    <style:style style:name="P78" style:parent-style-name="Lijstalinea" style:family="paragraph"/>
    <style:style style:name="P79" style:parent-style-name="Lijstalinea" style:family="paragraph"/>
    <style:style style:name="P80" style:parent-style-name="Lijstalinea" style:family="paragraph"/>
    <style:style style:name="P81" style:parent-style-name="Kop2" style:family="paragraph">
      <style:text-properties fo:font-size="18pt" style:font-size-asian="18pt" style:font-size-complex="16pt"/>
    </style:style>
    <style:style style:name="P82" style:parent-style-name="Kop3" style:family="paragraph">
      <style:text-properties style:font-name-asian="Calibri" style:use-window-font-color="true" fo:font-size="11pt" style:font-size-asian="11pt" style:font-size-complex="11pt"/>
    </style:style>
    <style:style style:name="P83" style:parent-style-name="Kop3" style:family="paragraph">
      <style:text-properties style:font-name-asian="Calibri" style:use-window-font-color="true" fo:font-size="11pt" style:font-size-asian="11pt" style:font-size-complex="11pt"/>
    </style:style>
    <style:style style:name="P84" style:parent-style-name="Kop3" style:family="paragraph">
      <style:text-properties style:font-name-asian="Calibri" style:use-window-font-color="true" fo:font-size="11pt" style:font-size-asian="11pt" style:font-size-complex="11pt"/>
    </style:style>
    <style:style style:name="P85" style:parent-style-name="Kop2" style:family="paragraph">
      <style:text-properties style:font-name-asian="Calibri" style:use-window-font-color="true" fo:font-size="11pt" style:font-size-asian="11pt" style:font-size-complex="11pt"/>
    </style:style>
    <style:style style:name="P86" style:parent-style-name="Lijstalinea" style:family="paragraph"/>
    <style:style style:name="P87" style:parent-style-name="Lijstalinea" style:family="paragraph"/>
    <style:style style:name="P88" style:parent-style-name="Lijstalinea" style:family="paragraph"/>
    <style:style style:name="P89" style:parent-style-name="Lijstalinea" style:family="paragraph"/>
    <style:style style:name="P90" style:parent-style-name="Lijstalinea" style:family="paragraph"/>
    <style:style style:name="P91" style:parent-style-name="Lijstalinea" style:family="paragraph"/>
    <style:style style:name="P92" style:parent-style-name="Lijstalinea" style:family="paragraph"/>
    <style:style style:name="P93" style:parent-style-name="Lijstalinea" style:family="paragraph"/>
    <style:style style:name="P94" style:parent-style-name="Lijstalinea" style:family="paragraph"/>
    <style:style style:name="P95" style:parent-style-name="Lijstalinea" style:family="paragraph"/>
    <style:style style:name="P96" style:parent-style-name="Kop3" style:family="paragraph">
      <style:text-properties fo:language="en" fo:country="US"/>
    </style:style>
    <style:style style:name="P97" style:parent-style-name="Kop3" style:family="paragraph">
      <style:text-properties fo:language="en" fo:country="US"/>
    </style:style>
    <style:style style:name="P98" style:parent-style-name="Lijstalinea" style:family="paragraph"/>
    <style:style style:name="P99" style:parent-style-name="Lijstalinea" style:family="paragraph"/>
    <style:style style:name="P100" style:parent-style-name="Kop3" style:family="paragraph">
      <style:text-properties fo:language="en" fo:country="US"/>
    </style:style>
    <style:style style:name="T101" style:parent-style-name="Standaardalinea-lettertype" style:family="text">
      <style:text-properties fo:font-weight="bold" style:font-weight-asian="bold" style:font-weight-complex="bold"/>
    </style:style>
    <style:style style:name="P102" style:parent-style-name="Standaard" style:family="paragraph"/>
    <style:style style:name="P103" style:parent-style-name="Standaard" style:family="paragraph"/>
    <style:style style:name="P104" style:parent-style-name="Standaard" style:family="paragraph"/>
    <style:style style:name="T105" style:parent-style-name="Standaardalinea-lettertype" style:family="text">
      <style:text-properties fo:font-weight="bold" style:font-weight-asian="bold" style:font-weight-complex="bold"/>
    </style:style>
    <style:style style:name="P106" style:parent-style-name="Standaard" style:family="paragraph"/>
    <style:style style:name="P107" style:parent-style-name="Standaard" style:family="paragraph"/>
    <style:style style:name="P108" style:parent-style-name="Standaard" style:family="paragraph"/>
    <style:style style:name="P109" style:parent-style-name="Standaard" style:family="paragraph">
      <style:text-properties fo:language="en" fo:country="US"/>
    </style:style>
    <style:style style:name="TableColumn111" style:family="table-column">
      <style:table-column-properties style:column-width="1.3111in"/>
    </style:style>
    <style:style style:name="TableColumn112" style:family="table-column">
      <style:table-column-properties style:column-width="1.6291in"/>
    </style:style>
    <style:style style:name="Table110" style:family="table">
      <style:table-properties style:width="2.9402in" fo:margin-left="0in" table:align="left"/>
    </style:style>
    <style:style style:name="TableRow113" style:family="table-row">
      <style:table-row-properties/>
    </style:style>
    <style:style style:name="TableCell114" style:family="table-cell">
      <style:table-cell-properties fo:border="none" style:writing-mode="lr-tb" style:vertical-align="middle" fo:padding-top="0.0104in" fo:padding-left="0.0104in" fo:padding-bottom="0.0104in" fo:padding-right="0.0104in"/>
    </style:style>
    <style:style style:name="P115" style:parent-style-name="Standaard" style:family="paragraph">
      <style:text-properties fo:font-weight="bold" style:font-weight-asian="bold" style:font-weight-complex="bold"/>
    </style:style>
    <style:style style:name="TableCell116" style:family="table-cell">
      <style:table-cell-properties fo:border="none" style:writing-mode="lr-tb" style:vertical-align="middle" fo:padding-top="0.0104in" fo:padding-left="0.0104in" fo:padding-bottom="0.0104in" fo:padding-right="0.0104in"/>
    </style:style>
    <style:style style:name="P117" style:parent-style-name="Standaard" style:family="paragraph">
      <style:text-properties fo:font-weight="bold" style:font-weight-asian="bold" style:font-weight-complex="bold"/>
    </style:style>
    <style:style style:name="TableRow118" style:family="table-row">
      <style:table-row-properties/>
    </style:style>
    <style:style style:name="TableCell119" style:family="table-cell">
      <style:table-cell-properties fo:border="none" style:writing-mode="lr-tb" style:vertical-align="middle" fo:padding-top="0.0104in" fo:padding-left="0.0104in" fo:padding-bottom="0.0104in" fo:padding-right="0.0104in"/>
    </style:style>
    <style:style style:name="TableCell120" style:family="table-cell">
      <style:table-cell-properties fo:border="none" style:writing-mode="lr-tb" style:vertical-align="middle" fo:padding-top="0.0104in" fo:padding-left="0.0104in" fo:padding-bottom="0.0104in" fo:padding-right="0.0104in"/>
    </style:style>
    <style:style style:name="TableRow121" style:family="table-row">
      <style:table-row-properties/>
    </style:style>
    <style:style style:name="TableCell122" style:family="table-cell">
      <style:table-cell-properties fo:border="none" style:writing-mode="lr-tb" style:vertical-align="middle" fo:padding-top="0.0104in" fo:padding-left="0.0104in" fo:padding-bottom="0.0104in" fo:padding-right="0.0104in"/>
    </style:style>
    <style:style style:name="TableCell123" style:family="table-cell">
      <style:table-cell-properties fo:border="none" style:writing-mode="lr-tb" style:vertical-align="middle" fo:padding-top="0.0104in" fo:padding-left="0.0104in" fo:padding-bottom="0.0104in" fo:padding-right="0.0104in"/>
    </style:style>
    <style:style style:name="P124" style:parent-style-name="Standaard" style:family="paragraph">
      <style:text-properties text:display="none"/>
    </style:style>
    <style:style style:name="TableColumn126" style:family="table-column">
      <style:table-column-properties style:column-width="0.834in"/>
    </style:style>
    <style:style style:name="TableColumn127" style:family="table-column">
      <style:table-column-properties style:column-width="2.1361in"/>
    </style:style>
    <style:style style:name="Table125" style:family="table">
      <style:table-properties style:width="2.9701in" fo:margin-left="0in" table:align="left"/>
    </style:style>
    <style:style style:name="TableRow128" style:family="table-row">
      <style:table-row-properties/>
    </style:style>
    <style:style style:name="TableCell129" style:family="table-cell">
      <style:table-cell-properties fo:border="none" style:writing-mode="lr-tb" style:vertical-align="middle" fo:padding-top="0.0104in" fo:padding-left="0.0104in" fo:padding-bottom="0.0104in" fo:padding-right="0.0104in"/>
    </style:style>
    <style:style style:name="TableCell130" style:family="table-cell">
      <style:table-cell-properties fo:border="none" style:writing-mode="lr-tb" style:vertical-align="middle" fo:padding-top="0.0104in" fo:padding-left="0.0104in" fo:padding-bottom="0.0104in" fo:padding-right="0.0104in"/>
    </style:style>
    <style:style style:name="P131" style:parent-style-name="Standaard" style:family="paragraph">
      <style:text-properties text:display="none"/>
    </style:style>
    <style:style style:name="TableColumn133" style:family="table-column">
      <style:table-column-properties style:column-width="0.9458in"/>
    </style:style>
    <style:style style:name="TableColumn134" style:family="table-column">
      <style:table-column-properties style:column-width="2.4493in"/>
    </style:style>
    <style:style style:name="Table132" style:family="table">
      <style:table-properties style:width="3.3951in" fo:margin-left="0in" table:align="left"/>
    </style:style>
    <style:style style:name="TableRow135" style:family="table-row">
      <style:table-row-properties/>
    </style:style>
    <style:style style:name="TableCell136" style:family="table-cell">
      <style:table-cell-properties fo:border="none" style:writing-mode="lr-tb" style:vertical-align="middle" fo:padding-top="0.0104in" fo:padding-left="0.0104in" fo:padding-bottom="0.0104in" fo:padding-right="0.0104in"/>
    </style:style>
    <style:style style:name="TableCell137" style:family="table-cell">
      <style:table-cell-properties fo:border="none" style:writing-mode="lr-tb" style:vertical-align="middle" fo:padding-top="0.0104in" fo:padding-left="0.0104in" fo:padding-bottom="0.0104in" fo:padding-right="0.0104in"/>
    </style:style>
    <style:style style:name="TableRow138" style:family="table-row">
      <style:table-row-properties/>
    </style:style>
    <style:style style:name="TableCell139" style:family="table-cell">
      <style:table-cell-properties fo:border="none" style:writing-mode="lr-tb" style:vertical-align="middle" fo:padding-top="0.0104in" fo:padding-left="0.0104in" fo:padding-bottom="0.0104in" fo:padding-right="0.0104in"/>
    </style:style>
    <style:style style:name="TableCell140" style:family="table-cell">
      <style:table-cell-properties fo:border="none" style:writing-mode="lr-tb" style:vertical-align="middle" fo:padding-top="0.0104in" fo:padding-left="0.0104in" fo:padding-bottom="0.0104in" fo:padding-right="0.0104in"/>
    </style:style>
    <style:style style:name="P141" style:parent-style-name="Standaard" style:family="paragraph">
      <style:text-properties text:display="none"/>
    </style:style>
    <style:style style:name="P142" style:parent-style-name="Standaard" style:family="paragraph">
      <style:text-properties text:display="none"/>
    </style:style>
    <style:style style:name="TableColumn144" style:family="table-column">
      <style:table-column-properties style:column-width="0.5583in"/>
    </style:style>
    <style:style style:name="TableColumn145" style:family="table-column">
      <style:table-column-properties style:column-width="2.8402in"/>
    </style:style>
    <style:style style:name="Table143" style:family="table">
      <style:table-properties style:width="3.3986in" fo:margin-left="0in" table:align="left"/>
    </style:style>
    <style:style style:name="TableRow146" style:family="table-row">
      <style:table-row-properties/>
    </style:style>
    <style:style style:name="TableCell147" style:family="table-cell">
      <style:table-cell-properties fo:border="none" style:writing-mode="lr-tb" style:vertical-align="middle" fo:padding-top="0.0104in" fo:padding-left="0.0104in" fo:padding-bottom="0.0104in" fo:padding-right="0.0104in"/>
    </style:style>
    <style:style style:name="TableCell148" style:family="table-cell">
      <style:table-cell-properties fo:border="none" style:writing-mode="lr-tb" style:vertical-align="middle" fo:padding-top="0.0104in" fo:padding-left="0.0104in" fo:padding-bottom="0.0104in" fo:padding-right="0.0104in"/>
    </style:style>
    <style:style style:name="TableColumn150" style:family="table-column">
      <style:table-column-properties style:column-width="0.8166in"/>
    </style:style>
    <style:style style:name="TableColumn151" style:family="table-column">
      <style:table-column-properties style:column-width="2.7347in"/>
    </style:style>
    <style:style style:name="Table149" style:family="table">
      <style:table-properties style:width="3.5513in" fo:margin-left="0in" table:align="left"/>
    </style:style>
    <style:style style:name="TableRow152" style:family="table-row">
      <style:table-row-properties/>
    </style:style>
    <style:style style:name="TableCell153" style:family="table-cell">
      <style:table-cell-properties fo:border="none" style:writing-mode="lr-tb" style:vertical-align="middle" fo:padding-top="0.0104in" fo:padding-left="0.0104in" fo:padding-bottom="0.0104in" fo:padding-right="0.0104in"/>
    </style:style>
    <style:style style:name="TableCell154" style:family="table-cell">
      <style:table-cell-properties fo:border="none" style:writing-mode="lr-tb" style:vertical-align="middle" fo:padding-top="0.0104in" fo:padding-left="0.0104in" fo:padding-bottom="0.0104in" fo:padding-right="0.0104in"/>
    </style:style>
    <style:style style:name="P155" style:parent-style-name="Standaard" style:family="paragraph">
      <style:text-properties text:display="none"/>
    </style:style>
    <style:style style:name="TableColumn157" style:family="table-column">
      <style:table-column-properties style:column-width="0.6368in"/>
    </style:style>
    <style:style style:name="TableColumn158" style:family="table-column">
      <style:table-column-properties style:column-width="3.1819in"/>
    </style:style>
    <style:style style:name="Table156" style:family="table">
      <style:table-properties style:width="3.8187in" fo:margin-left="0in" table:align="left"/>
    </style:style>
    <style:style style:name="TableRow159" style:family="table-row">
      <style:table-row-properties/>
    </style:style>
    <style:style style:name="TableCell160" style:family="table-cell">
      <style:table-cell-properties fo:border="none" style:writing-mode="lr-tb" style:vertical-align="middle" fo:padding-top="0.0104in" fo:padding-left="0.0104in" fo:padding-bottom="0.0104in" fo:padding-right="0.0104in"/>
    </style:style>
    <style:style style:name="TableCell161" style:family="table-cell">
      <style:table-cell-properties fo:border="none" style:writing-mode="lr-tb" style:vertical-align="middle" fo:padding-top="0.0104in" fo:padding-left="0.0104in" fo:padding-bottom="0.0104in" fo:padding-right="0.0104in"/>
    </style:style>
    <style:style style:name="P162" style:parent-style-name="Standaard" style:family="paragraph">
      <style:text-properties text:display="none"/>
    </style:style>
    <style:style style:name="TableColumn164" style:family="table-column">
      <style:table-column-properties style:column-width="0.5145in"/>
    </style:style>
    <style:style style:name="TableColumn165" style:family="table-column">
      <style:table-column-properties style:column-width="3.4854in"/>
    </style:style>
    <style:style style:name="Table163" style:family="table">
      <style:table-properties style:width="4in" fo:margin-left="0in" table:align="left"/>
    </style:style>
    <style:style style:name="TableRow166" style:family="table-row">
      <style:table-row-properties/>
    </style:style>
    <style:style style:name="TableCell167" style:family="table-cell">
      <style:table-cell-properties fo:border="none" style:writing-mode="lr-tb" style:vertical-align="middle" fo:padding-top="0.0104in" fo:padding-left="0.0104in" fo:padding-bottom="0.0104in" fo:padding-right="0.0104in"/>
    </style:style>
    <style:style style:name="TableCell168" style:family="table-cell">
      <style:table-cell-properties fo:border="none" style:writing-mode="lr-tb" style:vertical-align="middle" fo:padding-top="0.0104in" fo:padding-left="0.0104in" fo:padding-bottom="0.0104in" fo:padding-right="0.0104in"/>
    </style:style>
    <style:style style:name="P169" style:parent-style-name="Standaard" style:family="paragraph">
      <style:text-properties text:display="none"/>
    </style:style>
    <style:style style:name="TableColumn171" style:family="table-column">
      <style:table-column-properties style:column-width="0.7541in"/>
    </style:style>
    <style:style style:name="TableColumn172" style:family="table-column">
      <style:table-column-properties style:column-width="3.5625in"/>
    </style:style>
    <style:style style:name="Table170" style:family="table">
      <style:table-properties style:width="4.3166in" fo:margin-left="0in" table:align="left"/>
    </style:style>
    <style:style style:name="TableRow173" style:family="table-row">
      <style:table-row-properties/>
    </style:style>
    <style:style style:name="TableCell174" style:family="table-cell">
      <style:table-cell-properties fo:border="none" style:writing-mode="lr-tb" style:vertical-align="middle" fo:padding-top="0.0104in" fo:padding-left="0.0104in" fo:padding-bottom="0.0104in" fo:padding-right="0.0104in"/>
    </style:style>
    <style:style style:name="TableCell175" style:family="table-cell">
      <style:table-cell-properties fo:border="none" style:writing-mode="lr-tb" style:vertical-align="middle" fo:padding-top="0.0104in" fo:padding-left="0.0104in" fo:padding-bottom="0.0104in" fo:padding-right="0.0104in"/>
    </style:style>
    <style:style style:name="P176" style:parent-style-name="Standaard" style:family="paragraph">
      <style:text-properties text:display="none"/>
    </style:style>
    <style:style style:name="TableColumn178" style:family="table-column">
      <style:table-column-properties style:column-width="0.8326in"/>
    </style:style>
    <style:style style:name="TableColumn179" style:family="table-column">
      <style:table-column-properties style:column-width="4.0319in"/>
    </style:style>
    <style:style style:name="Table177" style:family="table">
      <style:table-properties style:width="4.8645in" fo:margin-left="0in" table:align="left"/>
    </style:style>
    <style:style style:name="TableRow180" style:family="table-row">
      <style:table-row-properties/>
    </style:style>
    <style:style style:name="TableCell181" style:family="table-cell">
      <style:table-cell-properties fo:border="none" style:writing-mode="lr-tb" style:vertical-align="middle" fo:padding-top="0.0104in" fo:padding-left="0.0104in" fo:padding-bottom="0.0104in" fo:padding-right="0.0104in"/>
    </style:style>
    <style:style style:name="TableCell182" style:family="table-cell">
      <style:table-cell-properties fo:border="none" style:writing-mode="lr-tb" style:vertical-align="middle" fo:padding-top="0.0104in" fo:padding-left="0.0104in" fo:padding-bottom="0.0104in" fo:padding-right="0.0104in"/>
    </style:style>
  </office:automatic-styles>
  <office:body>
    <office:text text:use-soft-page-breaks="true">
      <text:p text:style-name="P1">Game Design Document</text:p>
      <text:p text:style-name="P2"/>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soft-page-break/>
      <text:h text:style-name="P3" text:outline-level="2">1.<text:tab/>Titelpagina<text:s/></text:h>
      <text:h text:style-name="Kop3" text:outline-level="3"><text:span text:style-name="T10">1.1</text:span><text:span text:style-name="T11"><text:tab/>Spelnaam</text:span><text:span text:style-name="T12"><text:line-break/></text:span><text:span text:style-name="T13">FastLane</text:span></text:h>
      <text:h text:style-name="P14" text:outline-level="3">1.2<text:tab/>Ondertitel</text:h>
      <text:p text:style-name="Standaard">Ontwijk de obstakels en haal alle levels!</text:p>
      <text:p text:style-name="Standaard"/>
      <text:h text:style-name="P15" text:outline-level="3">1.3<text:tab/>Ontwikkelaars</text:h>
      <text:list text:style-name="LFO1" text:continue-numbering="true">
        <text:list-item>
          <text:p text:style-name="P16">Kadir Cakir</text:p>
        </text:list-item>
        <text:list-item>
          <text:p text:style-name="P17">Tygo Sebel</text:p>
        </text:list-item>
      </text:list>
      <text:h text:style-name="Kop2" text:outline-level="2">1.4<text:tab/>Datum &amp; versie laatste aanpassing GDD</text:h>
      <text:p text:style-name="Standaard">29 juni 2026 – Versie 1.0</text:p>
      <text:p text:style-name="Standaard"/>
      <text:h text:style-name="P18" text:outline-level="2">2.<text:tab/>Algemene beschrijving</text:h>
      <text:h text:style-name="P19" text:outline-level="3">2.1<text:tab/>Spelconcept</text:h>
      <text:p text:style-name="Standaard">FastLane is een eenvoudig racespel waarin de speler met een auto over een weg rijdt. Het doel is om zoveel mogelijk obstakels te ontwijken en alle levels te halen.</text:p>
      <text:list text:style-name="LFO1" text:continue-numbering="true">
        <text:list-item>
          <text:list>
            <text:list-item>
              <text:p text:style-name="P20">Doelpubliek</text:p>
            </text:list-item>
          </text:list>
        </text:list-item>
      </text:list>
      <text:p text:style-name="Standaard">Kinderen en jongeren vanaf ongeveer 10 jaar.</text:p>
      <text:list text:style-name="LFO1" text:continue-numbering="true">
        <text:list-item>
          <text:list>
            <text:list-item>
              <text:p text:style-name="P21">Genre(s)</text:p>
            </text:list-item>
          </text:list>
        </text:list-item>
      </text:list>
      <text:p text:style-name="P22">1. Arcade</text:p>
      <text:p text:style-name="P23">2. Race</text:p>
      <text:h text:style-name="P24" text:outline-level="3">2.4<text:tab/>Spelverloop</text:h>
      <text:p text:style-name="Standaard">De speler start het spel en bestuurt een auto. Tijdens het rijden verschijnen obstakels die ontwijkt moeten worden. Probeer alle <text:s/>de levels te halen</text:p>
      <text:list text:style-name="LFO1" text:continue-numbering="true">
        <text:list-item>
          <text:list>
            <text:list-item>
              <text:p text:style-name="P25">Uiterlijk en gevoel</text:p>
            </text:list-item>
          </text:list>
        </text:list-item>
      </text:list>
      <text:p text:style-name="Standaard">Het spel heeft een eenvoudige en kleurrijke uitstraling. De weg is duidelijk zichtbaar en de obstakels zijn gemakkelijk te herkennen. De besturing is simpel en het spel voelt snel en spannend aan.</text:p>
      <text:p text:style-name="Standaard"/>
      <text:h text:style-name="Kop1" text:outline-level="1">3.<text:tab/>Speloverzicht</text:h>
      <text:h text:style-name="Kop2" text:outline-level="2">3.1<text:tab/>Doelen</text:h>
      <text:p text:style-name="Standaard">Het doel van het spel is om alle levels te halen zonder tegen een obstakel aan te botsen.</text:p>
      <text:h text:style-name="Kop2" text:outline-level="2">3.2<text:tab/>Voortgang</text:h>
      <text:p text:style-name="Standaard">Na elke level word het spel een tikkie moeilijker</text:p>
      <text:h text:style-name="Kop2" text:outline-level="2">3.3<text:tab/>Spelstroom</text:h>
      <text:list text:style-name="LFO2" text:continue-numbering="true">
        <text:list-item>
          <text:p text:style-name="P26">Start het spel</text:p>
        </text:list-item>
        <text:list-item>
          <text:p text:style-name="P27">Speler klikt op start</text:p>
        </text:list-item>
        <text:list-item>
          <text:p text:style-name="P28">Het spel begint</text:p>
        </text:list-item>
        <text:list-item>
          <text:p text:style-name="P29">Obstakels verschijnen.</text:p>
        </text:list-item>
        <text:list-item>
          <text:p text:style-name="P30">De speler ontwijkt de obstakels.</text:p>
        </text:list-item>
        <text:list-item>
          <text:p text:style-name="P31">3keer botsen komt er een game over scherm</text:p>
        </text:list-item>
        <text:list-item>
          <text:p text:style-name="P32">De speler kan opnieuw beginnen.</text:p>
        </text:list-item>
      </text:list>
      <text:h text:style-name="Kop2" text:outline-level="2">3.4<text:tab/>Missie- en uitdagingenstructuur</text:h>
      <text:p text:style-name="Standaard">Er zijn geen missies. De uitdaging is om alle obstakels te ontwijken en alle levels verslaan.</text:p>
      <text:h text:style-name="Kop2" text:outline-level="2">3.5<text:tab/>Puzzelstructuur</text:h>
      <text:p text:style-name="Standaard">FastLane bevat geen puzzels.</text:p>
      <text:p text:style-name="Standaard"/>
      <text:h text:style-name="Kop1" text:outline-level="1">4.<text:tab/>Werking</text:h>
      <text:h text:style-name="Kop2" text:outline-level="2">4.1<text:tab/>Spelregels</text:h>
      <text:list text:style-name="LFO3" text:continue-numbering="true">
        <text:list-item>
          <text:p text:style-name="P33">De speler bestuurt de auto met de pijltjestoetsen of W, A, S, D en spatie.</text:p>
        </text:list-item>
        <text:list-item>
          <text:p text:style-name="P34">De auto mag niet buiten de weg rijden.<text:s/></text:p>
        </text:list-item>
        <text:list-item>
          <text:p text:style-name="P35">Bots je 4x tegen een obstakel, dan is het spel afgelopen.<text:s/></text:p>
        </text:list-item>
        <text:list-item>
          <text:p text:style-name="P36">Haal je alle level dan heb je gewonnen</text:p>
        </text:list-item>
      </text:list>
      <text:list text:style-name="LFO3" text:continue-numbering="true">
        <text:list-item>
          <text:list>
            <text:list-item>
              <text:p text:style-name="P37">Model van de spelwereld</text:p>
            </text:list-item>
          </text:list>
        </text:list-item>
      </text:list>
      <text:p text:style-name="Standaard">Je speelt in een mooie moderne stad die is gebouwd met flats, winkels en de zijkanten zijn rails die er zijn om je in het speelveld te houden.</text:p>
      <text:list text:style-name="LFO3" text:continue-numbering="true">
        <text:list-item>
          <text:list>
            <text:list-item>
              <text:p text:style-name="P38">Natuurkunde</text:p>
            </text:list-item>
          </text:list>
        </text:list-item>
      </text:list>
      <text:p text:style-name="Standaard">De auto beweegt soepel naar voren, achter, links en rechts. Obstakels bewegen met een constante snelheid naar beneden of staan er al.</text:p>
      <text:list text:style-name="LFO3" text:continue-numbering="true">
        <text:list-item>
          <text:list>
            <text:list-item>
              <text:p text:style-name="P39">Economie</text:p>
            </text:list-item>
          </text:list>
        </text:list-item>
      </text:list>
      <text:p text:style-name="Standaard">Er is geen geld of winkel in het spel.</text:p>
      <text:list text:style-name="LFO3" text:continue-numbering="true">
        <text:list-item>
          <text:list>
            <text:list-item>
              <text:p text:style-name="P40">Karakterbewegingen</text:p>
            </text:list-item>
          </text:list>
        </text:list-item>
      </text:list>
      <text:list text:style-name="LFO4" text:continue-numbering="true">
        <text:list-item>
          <text:p text:style-name="P41">Voren bewegen</text:p>
        </text:list-item>
        <text:list-item>
          <text:p text:style-name="P42">Achter bewegen</text:p>
        </text:list-item>
        <text:list-item>
          <text:p text:style-name="P43">Links bewegen<text:s/></text:p>
        </text:list-item>
        <text:list-item>
          <text:p text:style-name="P44">Rechts bewegen<text:s/></text:p>
        </text:list-item>
        <text:list-item>
          <text:p text:style-name="P45">Springen<text:s/></text:p>
        </text:list-item>
        <text:list-item>
          <text:p text:style-name="P46"><text:span text:style-name="T47">Niet buiten het speelveld rijden</text:span></text:p>
        </text:list-item>
      </text:list>
      <text:list text:style-name="LFO3" text:continue-numbering="true">
        <text:list-item>
          <text:list>
            <text:list-item>
              <text:p text:style-name="P48">Spelobjecten</text:p>
            </text:list-item>
          </text:list>
        </text:list-item>
      </text:list>
      <text:list text:style-name="LFO5" text:continue-numbering="true">
        <text:list-item>
          <text:p text:style-name="P49">Auto van de speler<text:s/></text:p>
        </text:list-item>
        <text:list-item>
          <text:p text:style-name="P50">Obstakels (bijvoorbeeld anderen auto’s, piano’s, verkeersborden, etc.)<text:s/></text:p>
        </text:list-item>
        <text:list-item>
          <text:p text:style-name="P51">Weg<text:s/></text:p>
        </text:list-item>
        <text:list-item>
          <text:p text:style-name="P52">Score<text:s/></text:p>
        </text:list-item>
        <text:list-item>
          <text:p text:style-name="P53">Startknop<text:s/></text:p>
        </text:list-item>
        <text:list-item>
          <text:p text:style-name="P54"><text:span text:style-name="T55">Game Over-scherm</text:span></text:p>
        </text:list-item>
      </text:list>
      <text:h text:style-name="Kop2" text:outline-level="2">4.7<text:tab/>Acties</text:h>
      <text:p text:style-name="Standaard">De speler kan:</text:p>
      <text:list text:style-name="LFO6" text:continue-numbering="true">
        <text:list-item>
          <text:p text:style-name="P56">Het spel starten.<text:s/></text:p>
        </text:list-item>
        <text:list-item>
          <text:p text:style-name="P57">Naar voren</text:p>
        </text:list-item>
        <text:list-item>
          <text:p text:style-name="P58">Naar achter</text:p>
        </text:list-item>
        <text:list-item>
          <text:p text:style-name="P59">Naar links sturen.<text:s/></text:p>
        </text:list-item>
        <text:list-item>
          <text:p text:style-name="P60">Naar rechts sturen.<text:s/></text:p>
        </text:list-item>
        <text:list-item>
          <text:p text:style-name="P61">Het spel opnieuw starten na 4x botsing.</text:p>
        </text:list-item>
      </text:list>
      <text:p text:style-name="Standaard"/>
      <text:list text:style-name="LFO3" text:continue-numbering="true">
        <text:list-item>
          <text:list>
            <text:list-item>
              <text:p text:style-name="P62">Oorlog</text:p>
            </text:list-item>
          </text:list>
        </text:list-item>
      </text:list>
      <text:p text:style-name="Standaard">Er zijn geen gevechten of wapens.</text:p>
      <text:list text:style-name="LFO3" text:continue-numbering="true">
        <text:list-item>
          <text:list>
            <text:list-item>
              <text:p text:style-name="P63">Schermstroom</text:p>
            </text:list-item>
          </text:list>
        </text:list-item>
      </text:list>
      <text:p text:style-name="Standaard">Startscherm <text:s/>Spel <text:s/>Game Over <text:s/>Opnieuw spelen <text:s/>Spel</text:p>
      <text:list text:style-name="LFO3" text:continue-numbering="true">
        <text:list-item>
          <text:list>
            <text:list-item>
              <text:p text:style-name="P64">Spelopties</text:p>
            </text:list-item>
          </text:list>
        </text:list-item>
      </text:list>
      <text:list text:style-name="LFO7" text:continue-numbering="true">
        <text:list-item>
          <text:p text:style-name="P65">Start spel<text:s/></text:p>
        </text:list-item>
        <text:list-item>
          <text:p text:style-name="P66"><text:span text:style-name="T67">Opnieuw spelen</text:span></text:p>
        </text:list-item>
      </text:list>
      <text:list text:style-name="LFO3" text:continue-numbering="true">
        <text:list-item>
          <text:list>
            <text:list-item>
              <text:p text:style-name="P68">Herhaling en opslaan</text:p>
            </text:list-item>
          </text:list>
        </text:list-item>
      </text:list>
      <text:p text:style-name="Standaard">Er is geen opslaan. Na een Game Over kan de speler direct opnieuw beginnen.</text:p>
      <text:list text:style-name="LFO3" text:continue-numbering="true">
        <text:list-item>
          <text:list>
            <text:list-item>
              <text:p text:style-name="P69">Valsspelen &amp; verrassingen</text:p>
            </text:list-item>
          </text:list>
        </text:list-item>
      </text:list>
      <text:p text:style-name="Standaard">Er zijn geen cheats. Een mogelijke verrassing is dat objecten zomaar naar je toe vliegen of op je vallen.</text:p>
      <text:p text:style-name="Standaard"/>
      <text:p text:style-name="P70"/>
      <text:h text:style-name="Kop1" text:outline-level="1">5.<text:tab/>Verhaal en vertelling</text:h>
      <text:h text:style-name="Kop2" text:outline-level="2">5.1<text:tab/>Achtergrondverhaal</text:h>
      <text:p text:style-name="Standaard">De speler is een bestuurder die is uitgedaagd door zijn vrienden om dom en hard te rijden maar terwijl hij rijd gebeurd er van alles op het weg.</text:p>
      <text:list text:style-name="LFO4" text:continue-numbering="true">
        <text:list-item>
          <text:list>
            <text:list-item>
              <text:p text:style-name="P71">Plotelementen</text:p>
            </text:list-item>
          </text:list>
        </text:list-item>
      </text:list>
      <text:p text:style-name="Standaard">Er is geen uitgebreid verhaal. De spanning komt vooral door het steeds moeilijker wordende spel.</text:p>
      <text:list text:style-name="LFO4" text:continue-numbering="true">
        <text:list-item>
          <text:list>
            <text:list-item>
              <text:p text:style-name="P72">Spelverhaal voortgang</text:p>
            </text:list-item>
          </text:list>
        </text:list-item>
      </text:list>
      <text:p text:style-name="Standaard">Tijdens het spel stijgt de score en word de posities van de obstakels moeilijker om te ontwijken. Hierdoor wordt het steeds lastiger om te overleven.</text:p>
      <text:list text:style-name="LFO4" text:continue-numbering="true">
        <text:list-item>
          <text:list>
            <text:list-item>
              <text:p text:style-name="P73">Tussenfilmpjes</text:p>
            </text:list-item>
          </text:list>
        </text:list-item>
      </text:list>
      <text:p text:style-name="Standaard">Er zijn geen tussenfilmpjes. Het spel begint direct en na een Game Over kan de speler meteen opnieuw starten.</text:p>
      <text:p text:style-name="Standaard"/>
      <text:h text:style-name="Kop1" text:outline-level="1">6.<text:tab/>Spelwereld</text:h>
      <text:h text:style-name="Kop2" text:outline-level="2">6.1<text:tab/>Algemeen uiterlijk en gevoel</text:h>
      <text:p text:style-name="Standaard">FastLane speelt zich af in een zelf gemaakte stad. De omgeving heeft een eenvoudige en kleurrijke uitstraling zodat de speler zich goed kan concentreren op het ontwijken van de obstakels.<text:s/>De sfeer is spannend omdat je heletijd obstacels moet ontwijken</text:p>
      <text:list text:style-name="LFO5" text:continue-numbering="true">
        <text:list-item>
          <text:list>
            <text:list-item>
              <text:p text:style-name="P74">Gebieden</text:p>
            </text:list-item>
          </text:list>
        </text:list-item>
      </text:list>
      <text:h text:style-name="Kop3" text:outline-level="3">Level 1</text:h>
      <text:p text:style-name="isselectedend">De speler rijdt door een stad. In deze levels zijn er niet echt moeilijke obstacels om te ontwijken en alles is een beetje simpel. Dit is ook de level waar de speler nog de controles leert. De kleuren zijn helder en rustig.</text:p>
      <text:h text:style-name="Kop3" text:outline-level="3">Level 2</text:h>
      <text:p text:style-name="isselectedend">Bij deze level leer je de jump mechanic en word gemiddeld de level moeilijker er beginnen ook objecten van boven te vallen<text:s/>Er verschijnen meer auto's waardoor het moeilijker wordt om veilig te rijden. De sfeer wordt spannender.</text:p>
      <text:h text:style-name="Kop3" text:outline-level="3">Level 3</text:h>
      <text:p text:style-name="Normaalweb">In dit level<text:s/>zie je voor het eerst objecten die naar jouw toe vliegen. Hierdoor moet de speler nog beter opletten. De moeilijk niveau word maar een beetje moeilijker.</text:p>
      <text:h text:style-name="Kop3" text:outline-level="3">Level 4</text:h>
      <text:p text:style-name="Normaalweb">In de laatste level word het extra moeilijk we gebruiken alle mechanics en we maken de auto sneller iets wat de speler niet zal verwachten waardoor het nog moeilijker word en nog spannender,<text:s/></text:p>
      <text:p text:style-name="Standaard"/>
      <text:soft-page-break/>
      <text:list text:style-name="LFO5" text:continue-numbering="true">
        <text:list-item>
          <text:list>
            <text:list-item>
              <text:list>
                <text:list-item>
                  <text:p text:style-name="P75">Algemene beschrijving en fysieke eigenschappen</text:p>
                </text:list-item>
              </text:list>
            </text:list-item>
          </text:list>
        </text:list-item>
      </text:list>
      <text:p text:style-name="Standaard">Alle levels bestaan uit een asfaltweg met wegmarkeringen.<text:s/>Obstacels zijn er al in en spawnen er in of vallen er in en de speler moet dat ontwijken</text:p>
      <text:h text:style-name="Kop3" text:outline-level="3">6.2.2<text:tab/>Relaties met de rest van de spelwereld</text:h>
      <text:p text:style-name="Normaalweb">Alle levels spelen zich af<text:s/>in<text:s/>dezelfde<text:s/>stad. Alleen de snelheid en het aantal obstakels veranderen<text:s/>en er komen nieuwe objecten bij.</text:p>
      <text:p text:style-name="Standaard"/>
      <text:p text:style-name="Standaard"/>
      <text:h text:style-name="Kop1" text:outline-level="1">7.<text:tab/>Karakters</text:h>
      <text:h text:style-name="Kop2" text:outline-level="2">7.1<text:tab/>Voor ieder karakter in het spel</text:h>
      <text:h text:style-name="Kop2" text:outline-level="2">7.1.1<text:tab/>Achtergrondverhaal</text:h>
      <text:p text:style-name="Standaard">De speler bestuurt een bestuurder die<text:s/>aan zijn vrienden wil laten zien dat hij goed kan autorijden</text:p>
      <text:h text:style-name="Kop3" text:outline-level="3">7.1.2<text:tab/>Persoonlijkheid</text:h>
      <text:p text:style-name="Standaard">Heethoofd egoïstisch<text:s/></text:p>
      <text:h text:style-name="Kop3" text:outline-level="3">7.1.3<text:tab/>Uiterlijk</text:h>
      <text:p text:style-name="Standaard">Een rode sportauto<text:s/>met twee zwarte strepen door het midden<text:s/>die duidelijk zichtbaar is op de weg<text:s/>(De karackter zie je niet echt).</text:p>
      <text:h text:style-name="Kop3" text:outline-level="3">7.1.4<text:tab/>Capaciteiten</text:h>
      <text:list text:style-name="LFO8" text:continue-numbering="true">
        <text:list-item>
          <text:p text:style-name="P76">Naar voren</text:p>
        </text:list-item>
        <text:list-item>
          <text:p text:style-name="P77">Naar achter</text:p>
        </text:list-item>
        <text:list-item>
          <text:p text:style-name="P78">Naar links</text:p>
        </text:list-item>
        <text:list-item>
          <text:p text:style-name="P79">Naar rechts</text:p>
        </text:list-item>
        <text:list-item>
          <text:p text:style-name="P80">Obstakels ontwijken</text:p>
        </text:list-item>
      </text:list>
      <text:h text:style-name="Kop3" text:outline-level="3">7.1.5<text:tab/>Relevantie voor het verhaal</text:h>
      <text:p text:style-name="Standaard">Is de hoofdpersonage en de karakter waar mee je speelt</text:p>
      <text:h text:style-name="Kop3" text:outline-level="3">7.1.6<text:tab/>Relaties met andere karakters</text:h>
      <text:p text:style-name="Standaard">Hij probeert de anderen auto’s te vermijden</text:p>
      <text:h text:style-name="Kop2" text:outline-level="2">7.2<text:tab/>Kunstmatige intelligentiegebruik in tegenstander en vijand</text:h>
      <text:p text:style-name="Standaard">Niet van toepassing.</text:p>
      <text:h text:style-name="Kop2" text:outline-level="2">7.3<text:tab/>Niet-gevechtsspelers en vriendelijke karakters</text:h>
      <text:p text:style-name="Standaard">Niet van toepassing.</text:p>
      <text:h text:style-name="Kop2" text:outline-level="2"/>
      <text:h text:style-name="P81" text:outline-level="2">Tegenstander</text:h>
      <text:h text:style-name="Kop2" text:outline-level="2">7.1.1<text:tab/>Achtergrondverhaal</text:h>
      <text:h text:style-name="P82" text:outline-level="3">De tegenstanders zijn andere auto's op de snelweg.</text:h>
      <text:h text:style-name="Kop3" text:outline-level="3">7.1.2<text:tab/>Persoonlijkheid</text:h>
      <text:p text:style-name="Standaard">Ze staan stil en doen niet echt wat</text:p>
      <text:soft-page-break/>
      <text:h text:style-name="Kop3" text:outline-level="3">7.1.3<text:tab/>Uiterlijk</text:h>
      <text:h text:style-name="P83" text:outline-level="3">Auto's in verschillende kleuren.</text:h>
      <text:h text:style-name="Kop3" text:outline-level="3">7.1.4<text:tab/>Capaciteiten</text:h>
      <text:p text:style-name="Lijstalinea">Ze staan stil</text:p>
      <text:h text:style-name="Kop3" text:outline-level="3">7.1.5<text:tab/>Relevantie voor het verhaal</text:h>
      <text:h text:style-name="P84" text:outline-level="3">Ze vormen de grootste uitdaging van het spel.</text:h>
      <text:h text:style-name="Kop3" text:outline-level="3">7.1.6<text:tab/>Relaties met andere karakters</text:h>
      <text:h text:style-name="P85" text:outline-level="2">Ze proberen de speler niet bewust te raken, maar veroorzaken Game Over bij een botsing</text:h>
      <text:h text:style-name="Kop2" text:outline-level="2">7.2<text:tab/>Kunstmatige intelligentiegebruik in tegenstander en vijand</text:h>
      <text:p text:style-name="Standaard">Niet van toepassing.</text:p>
      <text:h text:style-name="Kop2" text:outline-level="2">7.3<text:tab/>Niet-gevechtsspelers en vriendelijke karakters</text:h>
      <text:p text:style-name="Standaard">Niet van toepassing.</text:p>
      <text:p text:style-name="Standaard"/>
      <text:p text:style-name="Standaard"/>
      <text:h text:style-name="Kop1" text:outline-level="1">8.<text:tab/>Levels</text:h>
      <text:h text:style-name="Kop2" text:outline-level="2">8.1<text:tab/>Training level</text:h>
      <text:p text:style-name="Standaard">De speler leert de besturing kennen en oefent met het ontwijken van een klein aantal obstakels.</text:p>
      <text:h text:style-name="Kop2" text:outline-level="2">8.2<text:tab/>Voor ieder level<text:s/>Level 1</text:h>
      <text:h text:style-name="Kop3" text:outline-level="3">8.2.1<text:tab/>Samenvatting</text:h>
      <text:p text:style-name="Standaard">De speler leert het spel kennen.</text:p>
      <text:h text:style-name="Kop3" text:outline-level="3">8.2.2<text:tab/>Inleiding</text:h>
      <text:p text:style-name="Standaard">Het spel begint rustig.</text:p>
      <text:h text:style-name="Kop3" text:outline-level="3">8.2.3<text:tab/>Doelen</text:h>
      <text:p text:style-name="Standaard">Haal de level</text:p>
      <text:h text:style-name="Kop3" text:outline-level="3">8.2.4<text:tab/>Details van wat er in het level gebeurt</text:h>
      <text:p text:style-name="Standaard">In deze level gebeurt er niet echt wat ales staat stil en op zijn plek</text:p>
      <text:h text:style-name="Kop4" text:outline-level="4">8.2.4.1<text:tab/>Kaart/Map</text:h>
      <text:p text:style-name="Standaard">De stad waar we in rijden</text:p>
      <text:h text:style-name="Kop4" text:outline-level="4">8.2.4.2<text:tab/>Kritieke route die de speller moet volgen</text:h>
      <text:p text:style-name="Standaard">Blijf tussen de rijstroken en ontwijk de obstakels.</text:p>
      <text:h text:style-name="Kop4" text:outline-level="4">8.2.4.3<text:tab/>Belangrijke en toevallige ontmoetingen</text:h>
      <text:p text:style-name="Standaard">Enkele auto's verschijnen.</text:p>
      <text:p text:style-name="Standaard"/>
      <text:h text:style-name="Kop2" text:outline-level="2">8.2<text:tab/>Voor ieder level Level 2</text:h>
      <text:h text:style-name="Kop3" text:outline-level="3">8.2.1<text:tab/>Samenvatting</text:h>
      <text:p text:style-name="Standaard">Het spel wordt moeilijker.</text:p>
      <text:h text:style-name="Kop3" text:outline-level="3">8.2.2<text:tab/>Inleiding</text:h>
      <text:p text:style-name="Standaard">Meer auto’s<text:s/>en objecten<text:s/>verschijnen. Er vallen nu ook objecten van boven</text:p>
      <text:h text:style-name="Kop3" text:outline-level="3">8.2.3<text:tab/>Doelen</text:h>
      <text:p text:style-name="Standaard">Het level halen</text:p>
      <text:h text:style-name="Kop3" text:outline-level="3"/>
      <text:h text:style-name="Kop3" text:outline-level="3">8.2.4<text:tab/>Details van wat er in het level gebeurt</text:h>
      <text:list text:style-name="LFO11" text:continue-numbering="true">
        <text:list-item>
          <text:p text:style-name="P86">Hogere snelheid</text:p>
        </text:list-item>
        <text:list-item>
          <text:p text:style-name="P87">Meer obstakels</text:p>
        </text:list-item>
        <text:list-item>
          <text:p text:style-name="P88">Objecten vallen nu ook</text:p>
        </text:list-item>
      </text:list>
      <text:h text:style-name="Kop4" text:outline-level="4">8.2.4.1<text:tab/>Kaart/Map</text:h>
      <text:p text:style-name="Standaard">De zelfde soort stad maar dan een beetje anders</text:p>
      <text:h text:style-name="Kop4" text:outline-level="4">8.2.4.2<text:tab/>Kritieke route die de speller moet volgen</text:h>
      <text:p text:style-name="Standaard">Blijf snel reageren.</text:p>
      <text:h text:style-name="Kop4" text:outline-level="4">8.2.4.3<text:tab/>Belangrijke en toevallige ontmoetingen</text:h>
      <text:p text:style-name="Standaard">Meer auto's tegelijk.</text:p>
      <text:p text:style-name="Standaard"/>
      <text:h text:style-name="Kop2" text:outline-level="2">8.2<text:tab/>Voor ieder level<text:s/>Level 3</text:h>
      <text:h text:style-name="Kop3" text:outline-level="3">8.2.1<text:tab/>Samenvatting</text:h>
      <text:p text:style-name="Standaard">De spel word maar een beetje moeilijk</text:p>
      <text:h text:style-name="Kop3" text:outline-level="3">8.2.2<text:tab/>Inleiding</text:h>
      <text:p text:style-name="Standaard">Meer auto’s<text:s/>en objecten<text:s/>verschijnen. Er vliegen nu ook objecten naar jouw</text:p>
      <text:h text:style-name="Kop3" text:outline-level="3">8.2.3<text:tab/>Doelen</text:h>
      <text:p text:style-name="Standaard">Het level halen</text:p>
      <text:h text:style-name="Kop3" text:outline-level="3">8.2.4<text:tab/>Details van wat er in het level gebeurt</text:h>
      <text:list text:style-name="LFO12" text:continue-numbering="true">
        <text:list-item>
          <text:p text:style-name="P89">Hoge snelheid</text:p>
        </text:list-item>
        <text:list-item>
          <text:p text:style-name="P90">Extra obstakels</text:p>
        </text:list-item>
        <text:list-item>
          <text:p text:style-name="P91">Objecten die naar de speler vliegen</text:p>
        </text:list-item>
      </text:list>
      <text:h text:style-name="Kop4" text:outline-level="4">8.2.4.1<text:tab/>Kaart/Map</text:h>
      <text:p text:style-name="Standaard">De zelfde soort stad maar dan een beetje anders</text:p>
      <text:h text:style-name="Kop4" text:outline-level="4">8.2.4.2<text:tab/>Kritieke route die de speller moet volgen</text:h>
      <text:p text:style-name="Standaard">Blijf bewegen en ontwijk alle obstakels.</text:p>
      <text:h text:style-name="Kop4" text:outline-level="4">8.2.4.3<text:tab/>Belangrijke en toevallige ontmoetingen</text:h>
      <text:p text:style-name="Standaard">Auto's, verkeerskegels, vogels.</text:p>
      <text:p text:style-name="Standaard"/>
      <text:h text:style-name="Kop2" text:outline-level="2">8.2<text:tab/>Voor ieder level<text:s/>Level 4</text:h>
      <text:h text:style-name="Kop3" text:outline-level="3">8.2.1<text:tab/>Samenvatting</text:h>
      <text:p text:style-name="Standaard">Dit is de moeilijkste level</text:p>
      <text:h text:style-name="Kop3" text:outline-level="3">8.2.2<text:tab/>Inleiding</text:h>
      <text:p text:style-name="Standaard">Alle level worden nu een</text:p>
      <text:h text:style-name="Kop3" text:outline-level="3">8.2.3<text:tab/>Doelen</text:h>
      <text:p text:style-name="Standaard">Het level halen en de spel uitspelen</text:p>
      <text:h text:style-name="Kop3" text:outline-level="3">8.2.4<text:tab/>Details van wat er in het level gebeurt</text:h>
      <text:list text:style-name="LFO13" text:continue-numbering="true">
        <text:list-item>
          <text:p text:style-name="P92">Hoge snelheid</text:p>
        </text:list-item>
        <text:list-item>
          <text:p text:style-name="P93">Extra obstakels</text:p>
        </text:list-item>
        <text:list-item>
          <text:p text:style-name="P94">Objecten die naar de speler vliegen</text:p>
        </text:list-item>
        <text:list-item>
          <text:p text:style-name="P95">Vallende objecten</text:p>
        </text:list-item>
      </text:list>
      <text:p text:style-name="Standaard"/>
      <text:soft-page-break/>
      <text:h text:style-name="Kop4" text:outline-level="4">8.2.4.1<text:tab/>Kaart/Map</text:h>
      <text:p text:style-name="Standaard">De zelfde soort stad maar ene beetje anders</text:p>
      <text:h text:style-name="Kop4" text:outline-level="4">8.2.4.2<text:tab/>Kritieke route die de speller moet volgen</text:h>
      <text:p text:style-name="Standaard">Blijf bewegen en ontwijk alle obstakels.</text:p>
      <text:p text:style-name="Standaard"/>
      <text:h text:style-name="Kop4" text:outline-level="4">8.2.4.3<text:tab/>Belangrijke en toevallige ontmoetingen</text:h>
      <text:p text:style-name="Standaard">Auto’s, verkeersborden, vogels piano’s.<text:s/></text:p>
      <text:p text:style-name="Standaard"/>
      <text:p text:style-name="Standaard"/>
      <text:h text:style-name="Kop1" text:outline-level="1">9.<text:tab/>Interface</text:h>
      <text:h text:style-name="Kop2" text:outline-level="2">9.1<text:tab/>Visueel systeem</text:h>
      <text:h text:style-name="P96" text:outline-level="3">9.1.1<text:tab/>Visuele gebruikersinterface</text:h>
      <text:p text:style-name="Standaard">Op het scherm staat linksboven de score. In het midden rijdt de auto over de weg. Bij een Game Over verschijnt een groot venster met de eindscore en een knop om opnieuw te spelen.</text:p>
      <text:h text:style-name="P97" text:outline-level="3">9.1.2<text:tab/>Head-up display</text:h>
      <text:list text:style-name="LFO14" text:continue-numbering="true">
        <text:list-item>
          <text:p text:style-name="P98">Score linksboven.</text:p>
        </text:list-item>
        <text:list-item>
          <text:p text:style-name="P99">Je levens<text:s/>rechtsboven.</text:p>
        </text:list-item>
      </text:list>
      <text:h text:style-name="P100" text:outline-level="3">9.1.3<text:tab/>Menu’s/Menus</text:h>
      <text:p text:style-name="Standaard"><text:span text:style-name="T101">Startscherm</text:span></text:p>
      <text:list text:style-name="LFO15" text:continue-numbering="true">
        <text:list-item>
          <text:p text:style-name="P102">Spelnaam FastLane.</text:p>
        </text:list-item>
        <text:list-item>
          <text:p text:style-name="P103">Start-knop.</text:p>
        </text:list-item>
        <text:list-item>
          <text:p text:style-name="P104">Afsluiten-knop.</text:p>
        </text:list-item>
      </text:list>
      <text:p text:style-name="Standaard"><text:span text:style-name="T105">Game Over-scherm</text:span></text:p>
      <text:list text:style-name="LFO16" text:continue-numbering="true">
        <text:list-item>
          <text:p text:style-name="P106">Tekst "Game Over".</text:p>
        </text:list-item>
        <text:list-item>
          <text:p text:style-name="P107">Eindscore.</text:p>
        </text:list-item>
        <text:list-item>
          <text:p text:style-name="P108">Knop "Opnieuw spelen".</text:p>
        </text:list-item>
      </text:list>
      <text:p text:style-name="P109"/>
      <text:h text:style-name="Kop3" text:outline-level="3">9.1.4<text:tab/>Cameramodel</text:h>
      <text:p text:style-name="Standaard">Camera volgt de speler van achteren in 3D. de camera drijd met de auto als je een bocht maakt</text:p>
      <text:h text:style-name="Kop2" text:outline-level="2">9.2<text:tab/>Besturing en commando’s</text:h>
      <table:table table:style-name="Table110">
        <table:table-columns>
          <table:table-column table:style-name="TableColumn111"/>
          <table:table-column table:style-name="TableColumn112"/>
        </table:table-columns>
        <table:table-row table:style-name="TableRow113">
          <table:table-cell table:style-name="TableCell114">
            <text:p text:style-name="P115">Toets</text:p>
          </table:table-cell>
          <table:table-cell table:style-name="TableCell116">
            <text:p text:style-name="P117">Actie</text:p>
          </table:table-cell>
        </table:table-row>
        <table:table-row table:style-name="TableRow118">
          <table:table-cell table:style-name="TableCell119">
            <text:p text:style-name="Standaard">w/ pijl naar boven</text:p>
          </table:table-cell>
          <table:table-cell table:style-name="TableCell120">
            <text:p text:style-name="Standaard"><text:s text:c="26"/>naar voren</text:p>
          </table:table-cell>
        </table:table-row>
        <table:table-row table:style-name="TableRow121">
          <table:table-cell table:style-name="TableCell122">
            <text:p text:style-name="Standaard">d/ pijl naar beneden</text:p>
          </table:table-cell>
          <table:table-cell table:style-name="TableCell123">
            <text:p text:style-name="Standaard"><text:s text:c="25"/>naar achter</text:p>
          </table:table-cell>
        </table:table-row>
      </table:table>
      <text:p text:style-name="P124"/>
      <table:table table:style-name="Table125">
        <table:table-columns>
          <table:table-column table:style-name="TableColumn126"/>
          <table:table-column table:style-name="TableColumn127"/>
        </table:table-columns>
        <table:table-row table:style-name="TableRow128">
          <table:table-cell table:style-name="TableCell129">
            <text:p text:style-name="Standaard">A / Linkerpijl</text:p>
          </table:table-cell>
          <table:table-cell table:style-name="TableCell130">
            <text:p text:style-name="Standaard">Naar<text:s/><text:s text:c="30"/>links sturen</text:p>
          </table:table-cell>
        </table:table-row>
      </table:table>
      <text:p text:style-name="P131"/>
      <table:table table:style-name="Table132">
        <table:table-columns>
          <table:table-column table:style-name="TableColumn133"/>
          <table:table-column table:style-name="TableColumn134"/>
        </table:table-columns>
        <table:table-row table:style-name="TableRow135">
          <table:table-cell table:style-name="TableCell136">
            <text:p text:style-name="Standaard">D / Rechterpijl</text:p>
          </table:table-cell>
          <table:table-cell table:style-name="TableCell137">
            <text:p text:style-name="Standaard"><text:s text:c="36"/>Naar rechts sturen</text:p>
          </table:table-cell>
        </table:table-row>
        <table:table-row table:style-name="TableRow138">
          <table:table-cell table:style-name="TableCell139">
            <text:p text:style-name="Standaard">Spatie <text:s text:c="52"/></text:p>
          </table:table-cell>
          <table:table-cell table:style-name="TableCell140">
            <text:p text:style-name="Standaard"><text:s text:c="36"/>springen</text:p>
          </table:table-cell>
        </table:table-row>
      </table:table>
      <text:p text:style-name="P141"/>
      <text:p text:style-name="P142"/>
      <table:table table:style-name="Table143">
        <table:table-columns>
          <table:table-column table:style-name="TableColumn144"/>
          <table:table-column table:style-name="TableColumn145"/>
        </table:table-columns>
        <table:table-row table:style-name="TableRow146">
          <table:table-cell table:style-name="TableCell147">
            <text:p text:style-name="Standaard">muisklik</text:p>
          </table:table-cell>
          <table:table-cell table:style-name="TableCell148">
            <text:p text:style-name="Standaard"><text:s text:c="31"/>Start spel / Opnieuw spelen</text:p>
          </table:table-cell>
        </table:table-row>
      </table:table>
      <text:p text:style-name="Standaard"/>
      <text:h text:style-name="Kop2" text:outline-level="2">9.3<text:tab/>Audio, muziek, geluidseffecten</text:h>
      <table:table table:style-name="Table149">
        <table:table-columns>
          <table:table-column table:style-name="TableColumn150"/>
          <table:table-column table:style-name="TableColumn151"/>
        </table:table-columns>
        <table:table-row table:style-name="TableRow152">
          <table:table-cell table:style-name="TableCell153">
            <text:p text:style-name="Standaard">Gebeurtenis</text:p>
          </table:table-cell>
          <table:table-cell table:style-name="TableCell154">
            <text:p text:style-name="Standaard"><text:s text:c="66"/>Geluid</text:p>
          </table:table-cell>
        </table:table-row>
      </table:table>
      <text:p text:style-name="P155"/>
      <table:table table:style-name="Table156">
        <table:table-columns>
          <table:table-column table:style-name="TableColumn157"/>
          <table:table-column table:style-name="TableColumn158"/>
        </table:table-columns>
        <table:table-row table:style-name="TableRow159">
          <table:table-cell table:style-name="TableCell160">
            <text:p text:style-name="Standaard">Start spel</text:p>
          </table:table-cell>
          <table:table-cell table:style-name="TableCell161">
            <text:p text:style-name="Standaard"><text:s text:c="71"/>Startgeluid</text:p>
          </table:table-cell>
        </table:table-row>
      </table:table>
      <text:p text:style-name="P162"/>
      <table:table table:style-name="Table163">
        <table:table-columns>
          <table:table-column table:style-name="TableColumn164"/>
          <table:table-column table:style-name="TableColumn165"/>
        </table:table-columns>
        <table:table-row table:style-name="TableRow166">
          <table:table-cell table:style-name="TableCell167">
            <text:soft-page-break/>
            <text:p text:style-name="Standaard">Botsing</text:p>
          </table:table-cell>
          <table:table-cell table:style-name="TableCell168">
            <text:p text:style-name="Standaard"><text:s text:c="77"/>Crash-geluid</text:p>
          </table:table-cell>
        </table:table-row>
      </table:table>
      <text:p text:style-name="P169"/>
      <table:table table:style-name="Table170">
        <table:table-columns>
          <table:table-column table:style-name="TableColumn171"/>
          <table:table-column table:style-name="TableColumn172"/>
        </table:table-columns>
        <table:table-row table:style-name="TableRow173">
          <table:table-cell table:style-name="TableCell174">
            <text:p text:style-name="Standaard">Game Over</text:p>
          </table:table-cell>
          <table:table-cell table:style-name="TableCell175">
            <text:p text:style-name="Standaard"><text:s text:c="69"/>Game Over-geluid</text:p>
          </table:table-cell>
        </table:table-row>
      </table:table>
      <text:p text:style-name="P176"/>
      <table:table table:style-name="Table177">
        <table:table-columns>
          <table:table-column table:style-name="TableColumn178"/>
          <table:table-column table:style-name="TableColumn179"/>
        </table:table-columns>
        <table:table-row table:style-name="TableRow180">
          <table:table-cell table:style-name="TableCell181">
            <text:p text:style-name="Standaard">Achtergrond</text:p>
          </table:table-cell>
          <table:table-cell table:style-name="TableCell182">
            <text:p text:style-name="Standaard"><text:s text:c="66"/>Rustige achtergrondmuziek</text:p>
          </table:table-cell>
        </table:table-row>
      </table:table>
      <text:p text:style-name="Standaard"/>
      <text:h text:style-name="Kop2" text:outline-level="2">9.4<text:tab/>Spelkunst – gewenste stijl</text:h>
      <text:p text:style-name="Standaard">FastLane heeft een eenvoudige 3D-stijl met heldere kleuren. De weg en de auto's zijn duidelijk herkenbaar zodat de speler zich goed kan concentreren op het ontwijken van de obstakels. Het spel heeft een moderne en overzichtelijke uitstraling.</text:p>
      <text:h text:style-name="Kop2" text:outline-level="2">9.5<text:tab/>Helpsysteem</text:h>
      <text:p text:style-name="Standaard">Niet van toepassing.</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style:text-properties style:font-name-asian="Times New Roman" fo:font-weight="bold" style:font-weight-asian="bold" fo:color="#56355B"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style:text-properties style:font-name-asian="Times New Roman" fo:color="#56355B" fo:font-size="14pt" style:font-size-asian="14pt" style:font-size-complex="13pt" fo:hyphenate="false"/>
    </style:style>
    <style:style style:name="Kop3" style:display-name="Kop 3" style:family="paragraph" style:parent-style-name="Standaard" style:next-style-name="Standaard" style:default-outline-level="3">
      <style:paragraph-properties fo:keep-with-next="always" fo:keep-together="always"/>
      <style:text-properties style:font-name-asian="Times New Roman" fo:color="#56355B"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style:text-properties style:font-name-asian="Times New Roman" fo:font-style="italic" style:font-style-asian="italic" style:font-style-complex="italic" fo:color="#56355B" fo:hyphenate="false"/>
    </style:style>
    <style:style style:name="Standaard" style:display-name="Standaard" style:family="paragraph">
      <style:paragraph-properties fo:margin-bottom="0in" fo:line-height="115%"/>
      <style:text-properties fo:hyphenate="false"/>
    </style:style>
    <style:style style:name="Standaardalinea-lettertype" style:display-name="Standaardalinea-lettertype" style:family="text"/>
    <style:style style:name="Geenafstand" style:display-name="Geen afstand" style:family="paragraph" style:parent-style-name="Standaard">
      <style:paragraph-properties fo:line-height="100%"/>
      <style:text-properties fo:hyphenate="false"/>
    </style:style>
    <style:style style:name="Kop1Char" style:display-name="Kop 1 Char" style:family="text" style:parent-style-name="Standaardalinea-lettertype">
      <style:text-properties style:font-name="Calibri" style:font-name-asian="Times New Roman" style:font-name-complex="Times New Roman" fo:font-weight="bold" style:font-weight-asian="bold" fo:color="#56355B" fo:font-size="16pt" style:font-size-asian="16pt" style:font-size-complex="16pt"/>
    </style:style>
    <style:style style:name="Kop2Char" style:display-name="Kop 2 Char" style:family="text" style:parent-style-name="Standaardalinea-lettertype">
      <style:text-properties style:font-name="Calibri" style:font-name-asian="Times New Roman" style:font-name-complex="Times New Roman" fo:color="#56355B" fo:font-size="14pt" style:font-size-asian="14pt" style:font-size-complex="13pt"/>
    </style:style>
    <style:style style:name="Kop3Char" style:display-name="Kop 3 Char" style:family="text" style:parent-style-name="Standaardalinea-lettertype">
      <style:text-properties style:font-name="Calibri" style:font-name-asian="Times New Roman" style:font-name-complex="Times New Roman" fo:color="#56355B" fo:font-size="12pt" style:font-size-asian="12pt" style:font-size-complex="12pt"/>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Titelinbalk" style:display-name="Titel in balk" style:family="text" style:parent-style-name="Standaardalinea-lettertype">
      <style:text-properties fo:color="#FFFFFF" fo:font-size="20pt" style:font-size-asian="20pt"/>
    </style:style>
    <style:style style:name="Koptekst" style:display-name="Koptekst" style:family="paragraph" style:parent-style-name="Standaard">
      <style:paragraph-properties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Calibri"/>
    </style:styl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fo:font-size="8pt" style:font-size-asian="8pt" fo:hyphenate="false"/>
    </style:style>
    <style:style style:name="VoettekstChar" style:display-name="Voettekst Char" style:family="text" style:parent-style-name="Standaardalinea-lettertype">
      <style:text-properties style:font-name="Calibri" fo:font-size="8pt" style:font-size-asian="8pt"/>
    </style:style>
    <style:style style:name="Kop4Char" style:display-name="Kop 4 Char" style:family="text" style:parent-style-name="Standaardalinea-lettertype">
      <style:text-properties style:font-name="Calibri" style:font-name-asian="Times New Roman" style:font-name-complex="Times New Roman" fo:font-style="italic" style:font-style-asian="italic" style:font-style-complex="italic" fo:color="#56355B"/>
    </style:style>
    <style:style style:name="Ballontekst" style:display-name="Ballontekst" style:family="paragraph" style:parent-style-name="Standaard">
      <style:paragraph-properties fo:line-height="100%"/>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font-size="9pt" style:font-size-asian="9pt" style:font-size-complex="9pt"/>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margin-bottom="0.1388in" fo:line-height="100%"/>
      <style:text-properties fo:font-size="10pt" style:font-size-asian="10pt" style:font-size-complex="10pt" fo:hyphenate="false"/>
    </style:style>
    <style:style style:name="TekstopmerkingChar" style:display-name="Tekst opmerking Char" style:family="text" style:parent-style-name="Standaardalinea-lettertype">
      <style:text-properties style:font-name="Calibri" style:font-name-asian="Calibri" style:font-name-complex="Times New Roman" fo:font-size="10pt" style:font-size-asian="10pt" style:font-size-complex="10pt"/>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vaninhoudsopgave" style:display-name="Kop van inhoudsopgave" style:family="paragraph" style:parent-style-name="Kop1" style:next-style-name="Standaard" style:default-outline-level="1">
      <style:text-properties style:language-asian="nl" style:country-asian="NL"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Revisie" style:display-name="Revisie" style:family="paragraph">
      <style:paragraph-properties fo:margin-bottom="0in" fo:line-height="100%"/>
      <style:text-properties fo:hyphenate="false"/>
    </style:style>
    <style:style style:name="isselectedend" style:display-name="isselectedend" style:family="paragraph" style:parent-style-name="Standaard">
      <style:paragraph-properties fo:margin-top="0.0694in" fo:margin-bottom="0.0694in" fo:line-height="100%"/>
      <style:text-properties style:font-name="Times New Roman" style:font-name-asian="Times New Roman" fo:font-size="12pt" style:font-size-asian="12pt" style:font-size-complex="12pt" style:language-asian="nl" style:country-asian="NL" fo:hyphenate="true"/>
    </style:style>
    <style:style style:name="Normaalweb" style:display-name="Normaal (web)" style:family="paragraph" style:parent-style-name="Standaard">
      <style:paragraph-properties fo:margin-top="0.0694in" fo:margin-bottom="0.0694in" fo:line-height="100%"/>
      <style:text-properties style:font-name="Times New Roman" style:font-name-asian="Times New Roman" fo:font-size="12pt" style:font-size-asian="12pt" style:font-size-complex="12pt" style:language-asian="nl" style:country-asian="NL"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text:start-value="2">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3"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0"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0"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0"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0"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2">
      <text:list-level-style-number text:level="1"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1"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1"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1"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1"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1"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1"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text:start-value="2">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3"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0"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0"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0"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0"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text:start-value="2">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3"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0"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0"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0"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0"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text:start-value="2">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3"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0"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0"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0"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0"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page-layout style:name="PL1">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4" style:parent-style-name="Voettekst" style:family="paragraph">
      <style:paragraph-properties fo:text-align="center">
        <style:tab-stops>
          <style:tab-stop style:type="center" style:position="0.3937in"/>
          <style:tab-stop style:type="left" style:position="2.1659in"/>
          <style:tab-stop style:type="right" style:position="9.725in"/>
        </style:tab-stops>
      </style:paragraph-properties>
    </style:style>
    <style:style style:name="T5" style:parent-style-name="Standaardalinea-lettertype" style:family="text">
      <style:text-properties fo:language="en" fo:country="US"/>
    </style:style>
    <style:style style:name="T6" style:parent-style-name="Standaardalinea-lettertype" style:family="text">
      <style:text-properties fo:language="en" fo:country="US"/>
    </style:style>
    <style:style style:name="T7" style:parent-style-name="Standaardalinea-lettertype" style:family="text">
      <style:text-properties style:font-size-complex="8pt" fo:language="en" fo:country="US"/>
    </style:style>
    <style:style style:name="T8" style:parent-style-name="Standaardalinea-lettertype" style:family="text">
      <style:text-properties style:font-size-complex="8pt" fo:language="en" fo:country="US"/>
    </style:style>
    <style:style style:name="T9" style:parent-style-name="Standaardalinea-lettertype" style:family="text">
      <style:text-properties style:font-size-complex="8pt" fo:language="en" fo:country="US"/>
    </style:style>
    <style:style style:family="graphic" style:name="a0" style:parent-style-name="Graphics">
      <style:graphic-properties fo:border="0.01042in none" fo:background-color="transparent" style:wrap="run-through" style:run-through="background" fo:clip="rect(0in, 0in, 0in, 0in)" style:horizontal-rel="page" style:vertical-rel="page" style:horizontal-pos="center" style:vertical-pos="middle"/>
    </style:style>
    <style:style style:family="graphic" style:name="a1" style:parent-style-name="Graphics">
      <style:graphic-properties fo:border="0.01042in none" fo:background-color="transparent"/>
    </style:style>
  </office:automatic-styles>
  <office:master-styles>
    <style:master-page style:name="MP0" style:page-layout-name="PL0">
      <style:header>
        <text:p text:style-name="Koptekst"><draw:frame draw:z-index="251659264" draw:style-name="a0" draw:name="WordPictureWatermark171006720" text:anchor-type="paragraph" svg:x="0in" svg:y="0in" svg:width="8.26667in" svg:height="11.69306in" style:rel-width="scale" style:rel-height="scale"><draw:image xlink:href="media/image1.png" xlink:type="simple" xlink:show="embed" xlink:actuate="onLoad"/><svg:title/><svg:desc/></draw:frame></text:p>
      </style:header>
    </style:master-page>
    <style:master-page style:name="MP1" style:page-layout-name="PL1">
      <style:header>
        <text:p text:style-name="Koptekst"/>
      </style:header>
      <style:footer>
        <text:p text:style-name="P4"><draw:frame draw:style-name="a1" draw:name="Afbeelding 1" text:anchor-type="as-char" svg:x="0in" svg:y="0in" svg:width="1.00394in" svg:height="0.3937in" style:rel-width="scale" style:rel-height="scale"><draw:image xlink:href="media/image2.png" xlink:type="simple" xlink:show="embed" xlink:actuate="onLoad"/><svg:title/><svg:desc>Afbeelding met tekst

Automatisch gegenereerde beschrijving</svg:desc></draw:frame><text:span text:style-name="T5"><text:tab/>Servicedocument format GDD BPG_PF_D1-K1_1v1</text:span><text:span text:style-name="T6"><text:tab/></text:span><text:span text:style-name="T7"><text:page-number text:fixed="false">2</text:page-number></text:span><text:span text:style-name="T8">/</text:span><text:span text:style-name="T9"><text:page-count>3</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atih cakir</meta:initial-creator>
    <dc:creator>Kadir Çakir</dc:creator>
    <meta:creation-date>2026-06-28T23:30:00Z</meta:creation-date>
    <dc:date>2026-06-29T01:34:00Z</dc:date>
    <meta:template xlink:href="Servicedocument%20format%20GDD_BPG_PF_D1-K1_1v1" xlink:type="simple"/>
    <meta:editing-cycles>2</meta:editing-cycles>
    <meta:editing-duration>PT5940S</meta:editing-duration>
    <meta:user-defined meta:name="ContentTypeId">0x010100B09488BDDF616647B14E6F02A98E31CD</meta:user-defined>
    <meta:user-defined meta:name="Order" meta:value-type="float">561600</meta:user-defined>
    <meta:user-defined meta:name="xd_Signature" meta:value-type="boolean">false</meta:user-defined>
    <meta:user-defined meta:name="xd_ProgID"/>
    <meta:user-defined meta:name="_ExtendedDescription"/>
    <meta:user-defined meta:name="TriggerFlowInfo"/>
    <meta:user-defined meta:name="ComplianceAssetId"/>
    <meta:user-defined meta:name="TemplateUrl"/>
    <meta:document-statistic meta:page-count="10" meta:paragraph-count="20" meta:word-count="1608" meta:character-count="10437" meta:row-count="73" meta:non-whitespace-character-count="8849"/>
  </office:meta>
</office:document-meta>
</file>